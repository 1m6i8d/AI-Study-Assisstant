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02132" officeooo:paragraph-rsid="0010213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Add Timetable module</text:p>
        </text:list-item>
        <text:list-item>
          <text:p text:style-name="P1">Notes, Subjects, Flashcards: enable text formatting</text:p>
        </text:list-item>
        <text:list-item>
          <text:p text:style-name="P1">ability to save generated quizzes and redo them</text:p>
        </text:list-item>
        <text:list-item>
          <text:p text:style-name="P1">improve quiz automated checking (ability to flag incorrect grading)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3T09:15:58.059500444</meta:creation-date>
    <dc:date>2026-07-23T09:19:48.144040890</dc:date>
    <meta:editing-duration>PT3M55S</meta:editing-duration>
    <meta:editing-cycles>1</meta:editing-cycles>
    <meta:document-statistic meta:table-count="0" meta:image-count="0" meta:object-count="0" meta:page-count="1" meta:paragraph-count="5" meta:word-count="31" meta:character-count="190" meta:non-whitespace-character-count="168"/>
    <meta:generator>LibreOffice/26.2.4.2$Linux_X86_64 LibreOffice_project/620$Build-2</meta:generator>
  </office:meta>
</office:document-meta>
</file>